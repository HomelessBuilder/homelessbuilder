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9a3" officeooo:paragraph-rsid="001f69a3"/>
    </style:style>
    <style:style style:name="P2" style:family="paragraph" style:parent-style-name="Standard">
      <style:text-properties officeooo:rsid="00203b28" officeooo:paragraph-rsid="00203b28"/>
    </style:style>
    <style:style style:name="P3" style:family="paragraph" style:parent-style-name="Standard">
      <style:text-properties officeooo:rsid="00214e1b" officeooo:paragraph-rsid="00214e1b"/>
    </style:style>
    <style:style style:name="P4" style:family="paragraph" style:parent-style-name="Standard">
      <style:text-properties officeooo:rsid="0022fffc" officeooo:paragraph-rsid="0022fffc"/>
    </style:style>
    <style:style style:name="P5" style:family="paragraph" style:parent-style-name="Standard">
      <style:text-properties officeooo:rsid="0026bd09" officeooo:paragraph-rsid="0026bd09"/>
    </style:style>
    <style:style style:name="T1" style:family="text">
      <style:text-properties officeooo:rsid="00203b28"/>
    </style:style>
    <style:style style:name="T2" style:family="text">
      <style:text-properties officeooo:rsid="00214e1b"/>
    </style:style>
    <style:style style:name="T3" style:family="text">
      <style:text-properties officeooo:rsid="0023b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pisode one</text:p>
      <text:p text:style-name="P1"/>
      <text:p text:style-name="P1">A year ago, my night-crew supervisor role began falling apart with a transfer to another store location.</text:p>
      <text:p text:style-name="P1"/>
      <text:p text:style-name="P1">Without much experience in the company, I had been promoted to a leadership role over people with many years more experience. I hung on for a few years the best I could, but was ultimately unable to overcome that experience gap as I was transferred from store to store by management instead of receiving proper training and mentorship to address with my deficiencies.</text:p>
      <text:p text:style-name="P1"/>
      <text:p text:style-name="P1">A few months after my final transfer, I walked away from the company because I could no longer see a future with them. My time did help me grow as a person and development more effective leadership skills. <text:span text:style-name="T1">T</text:span>he entire experience was demoralizing, <text:span text:style-name="T1">while also aiding in my growth. This growth allowed me to see other opportunities as achievable. With the economy in the current state that it is in, my efforts to find another job resulted in more disappointment.</text:span></text:p>
      <text:p text:style-name="P1"/>
      <text:p text:style-name="P2">So, I decided to put my energy into something that could excite me and boost my self-worth. I turned to writing a book. While not a long book, I learned much about the process and struggles. <text:span text:style-name="T2">After this I started focusing my attention on building business to provide AI services to small business owners in the local area. Developed a website, redeveloped it, then got it ranked by Google and AI, before again redoing the webpages to try to appear more professional. Now, have an even better functioning and looking to work on building out.</text:span></text:p>
      <text:p text:style-name="P1"/>
      <text:p text:style-name="P3">My status now is desperation. Needing the business to be a success, but haven’t figured out how to land those important first few key clients. Everything is telling me that telling my story through YouTube Shorts may how to get results. To document my journey, promote my offerings, and gain confidence doing something scary. If I succeed, I should have something very informative in time.</text:p>
      <text:p text:style-name="P3"/>
      <text:p text:style-name="P3">Please join me as head down this new path into an unknown future.</text:p>
      <text:p text:style-name="P2"/>
      <text:p text:style-name="P2"/>
      <text:p text:style-name="P4">ChatGPT Rewrite for episode one</text:p>
      <text:p text:style-name="P4"/>
      <text:p text:style-name="P4">One year ago, I thought I had a career.</text:p>
      <text:p text:style-name="P4"/>
      <text:p text:style-name="P4">I was a night-crew supervisor, leading people who often had more experience than I did. I tried to grow into the role, but instead of receiving the training and mentorship I needed, I was transferred from store to store.</text:p>
      <text:p text:style-name="P4"/>
      <text:p text:style-name="P4">For years, I did my best to keep up.</text:p>
      <text:p text:style-name="P4"/>
      <text:p text:style-name="P4">Eventually, I couldn't ignore the truth anymore.</text:p>
      <text:p text:style-name="P4"/>
      <text:p text:style-name="P4">I no longer saw a future there.</text:p>
      <text:p text:style-name="P4"/>
      <text:p text:style-name="P4">So I walked away.</text:p>
      <text:p text:style-name="P4"/>
      <text:p text:style-name="P4">I thought finding another job would be straightforward.</text:p>
      <text:p text:style-name="P4"/>
      <text:p text:style-name="P4">It wasn't.</text:p>
      <text:p text:style-name="P4"/>
      <text:p text:style-name="P4">Application after application led nowhere.</text:p>
      <text:p text:style-name="P4"><text:soft-page-break/></text:p>
      <text:p text:style-name="P4">Months passed.</text:p>
      <text:p text:style-name="P4"/>
      <text:p text:style-name="P4">The more doors that stayed closed, the more I started asking a different question:</text:p>
      <text:p text:style-name="P4"/>
      <text:p text:style-name="P4">What if I stopped waiting for someone else to give me an opportunity <text:span text:style-name="T3">and focused on creating the opportunity</text:span>?</text:p>
      <text:p text:style-name="P4"/>
      <text:p text:style-name="P4">First, I wrote a book.</text:p>
      <text:p text:style-name="P4"/>
      <text:p text:style-name="P4"><text:span text:style-name="T3">Then, </text:span>I became obsessed with AI.</text:p>
      <text:p text:style-name="P4"/>
      <text:p text:style-name="P4">I spent months learning, building, rebuilding, and teaching myself how businesses could use automation to save time and grow.</text:p>
      <text:p text:style-name="P4"/>
      <text:p text:style-name="P4">I built a website.</text:p>
      <text:p text:style-name="P4"/>
      <text:p text:style-name="P4">Redesigned it.</text:p>
      <text:p text:style-name="P4"/>
      <text:p text:style-name="P4">Got it ranking on Google.</text:p>
      <text:p text:style-name="P4"/>
      <text:p text:style-name="P4">Redesigned it again.</text:p>
      <text:p text:style-name="P4"/>
      <text:p text:style-name="P4">And now I'm here.</text:p>
      <text:p text:style-name="P4"/>
      <text:p text:style-name="P4">No clients.</text:p>
      <text:p text:style-name="P4"/>
      <text:p text:style-name="P4">No guarantees.</text:p>
      <text:p text:style-name="P4"/>
      <text:p text:style-name="P4">Just a growing skill set and a belief that there's value in what I've built.</text:p>
      <text:p text:style-name="P4"/>
      <text:p text:style-name="P4">So today I'm starting a public experiment.</text:p>
      <text:p text:style-name="P4"/>
      <text:p text:style-name="P4">I'm documenting my attempt to build an AI automation business from the ground up.</text:p>
      <text:p text:style-name="P4"/>
      <text:p text:style-name="P4">The wins.</text:p>
      <text:p text:style-name="P4"/>
      <text:p text:style-name="P4">The mistakes.</text:p>
      <text:p text:style-name="P4"/>
      <text:p text:style-name="P4">The rejections.</text:p>
      <text:p text:style-name="P4"/>
      <text:p text:style-name="P4">The lessons.</text:p>
      <text:p text:style-name="P4"/>
      <text:p text:style-name="P4">Everything.</text:p>
      <text:p text:style-name="P4"/>
      <text:p text:style-name="P4">Maybe it works.</text:p>
      <text:p text:style-name="P4"/>
      <text:p text:style-name="P4">Maybe it doesn't.</text:p>
      <text:p text:style-name="P4"/>
      <text:p text:style-name="P4">Either way, you'll see exactly what happens.</text:p>
      <text:p text:style-name="P4"/>
      <text:p text:style-name="P4">Day 1 starts now.</text:p>
      <text:p text:style-name="P4"><text:soft-page-break/></text:p>
      <text:p text:style-name="P4">Episode two</text:p>
      <text:p text:style-name="P4"/>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30T10:08:37.601679999</meta:creation-date>
    <dc:date>2026-06-05T16:02:57.261507635</dc:date>
    <meta:editing-duration>P4DT16H58M26S</meta:editing-duration>
    <meta:editing-cycles>2</meta:editing-cycles>
    <meta:generator>LibreOffice/24.2.7.2$Linux_X86_64 LibreOffice_project/420$Build-2</meta:generator>
    <meta:document-statistic meta:table-count="0" meta:image-count="0" meta:object-count="0" meta:page-count="3" meta:paragraph-count="44" meta:word-count="581" meta:character-count="3330" meta:non-whitespace-character-count="2791"/>
  </office:meta>
</office:document-meta>
</file>