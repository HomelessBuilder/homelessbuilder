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a63e" officeooo:paragraph-rsid="000ea63e"/>
    </style:style>
    <style:style style:name="P2" style:family="paragraph" style:parent-style-name="Standard">
      <style:text-properties officeooo:rsid="001274d8" officeooo:paragraph-rsid="001274d8"/>
    </style:style>
    <style:style style:name="T1" style:family="text">
      <style:text-properties officeooo:rsid="00108dc7"/>
    </style:style>
    <style:style style:name="T2" style:family="text">
      <style:text-properties officeooo:rsid="00126eb2"/>
    </style:style>
    <style:style style:name="T3" style:family="text">
      <style:text-properties officeooo:rsid="001274d8"/>
    </style:style>
    <style:style style:name="T4" style:family="text">
      <style:text-properties officeooo:rsid="00128254"/>
    </style:style>
    <style:style style:name="T5" style:family="text">
      <style:text-properties officeooo:rsid="00135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IMMEDIATE RELEASE</text:p>
      <text:p text:style-name="P1"/>
      <text:p text:style-name="P1">Local Entrepreneur Builds AI Services Business While Experiencing Homelessness, Documenting the Journey Online</text:p>
      <text:p text:style-name="P1"/>
      <text:p text:style-name="P1">[<text:span text:style-name="T1">San Diego, CA</text:span>] — [<text:span text:style-name="T1">June 4, 2026</text:span>] — Facing unemployment, housing instability, and an uncertain future, local entrepreneur Daniel Rickey is attempting to build an artificial intelligence services business from a unconventional workspace<text:span text:style-name="T3">s</text:span>: a neighborhood Starbucks, <text:span text:style-name="T3">and the patch of dirt in a park where he sleeps most nights.</text:span></text:p>
      <text:p text:style-name="P2"/>
      <text:p text:style-name="P1">After several years working overnight in grocery store management, a series of store transfers and <text:span text:style-name="T3">my personal </text:span>challenges led to the end of a career that once seemed promising. Despite earning an early promotion into a leadership position, repeated transfers a<text:span text:style-name="T3">long with</text:span> limited <text:span text:style-name="T3">training and </text:span>mentorship made long-term success increasingly difficult. Following a final transfer and subsequent demotion, Rickey left the company in search of a new direction.</text:p>
      <text:p text:style-name="P1"/>
      <text:p text:style-name="P1">What followed was a difficult period marked by unsuccessful job searches and growing financial pressure. Rather than giving up, Rickey chose to pursue entrepreneurship.</text:p>
      <text:p text:style-name="P1"/>
      <text:p text:style-name="P1">"I needed something that would restore my sense of purpose and self-worth," said Rickey. "I started by writing a book, which taught me a lot about discipline and perseverance. Then I turned my attention to building a business focused on helping <text:span text:style-name="T3">local s</text:span>mall businesses use AI tools to save time, improve marketing, and compete more effectively."</text:p>
      <text:p text:style-name="P1"/>
      <text:p text:style-name="P1">Over the past year, Rickey has taught himself website development, search engine optimization, AI-assisted marketing strategies, and digital business operations. Working primarily from public spaces with reliable internet access, he has repeatedly redesigned and improved his company's website while developing service offerings aimed at small business owners <text:span text:style-name="T3">who lack the time, </text:span><text:span text:style-name="T4">skills and likely re</text:span><text:span text:style-name="T3">sources to hire a team, </text:span><text:span text:style-name="T4">required </text:span><text:span text:style-name="T3">to develop </text:span><text:span text:style-name="T4">the </text:span><text:span text:style-name="T3">advanced systems </text:span><text:span text:style-name="T4">today’s companies need to be successful in their respective industries.</text:span></text:p>
      <text:p text:style-name="P1"/>
      <text:p text:style-name="P1">Today, the business remains in its early stages. Revenue <text:span text:style-name="T4">has yet to start flowing in</text:span> and the challenge of securing those first key clients remains significant. However, rather than hiding those struggles, Rickey has decided to <text:span text:style-name="T2">begin</text:span> document<text:span text:style-name="T2">ing </text:span>h<text:span text:style-name="T2">is </text:span>experience publicly through a YouTube <text:span text:style-name="T2">Shorts </text:span>vl<text:span text:style-name="T2">o</text:span>g series <text:span text:style-name="T5">through a new channel that he named Homeless Builder</text:span>.</text:p>
      <text:p text:style-name="P1"/>
      <text:p text:style-name="P1">Th<text:span text:style-name="T5">e Homeless Builder </text:span><text:span text:style-name="T2">vlog </text:span>will chronicle the realities of entrepreneurship while experiencing homelessness, including the challenges of building a business without traditional resources, the lessons learned along the way, and the role emerging AI technologies can play in creating new opportunities.</text:p>
      <text:p text:style-name="P1"/>
      <text:p text:style-name="P1">"This isn't a success story yet," said Rickey. "It's a story that's still being written. I want people to see what the process actually looks like—the setbacks, the uncertainty, and hopefully the progress. If sharing the journey helps inspire someone else to keep going, then it's worth it."</text:p>
      <text:p text:style-name="P1"/>
      <text:p text:style-name="P1">The vlog series will follow the day-to-day effort to transform a struggling startup into a sustainable business while highlighting the growing accessibility of AI tools for small businesses and solo entrepreneurs.</text:p>
      <text:p text:style-name="P1"/>
      <text:p text:style-name="P1">For local business owners, community members, and others interested in entrepreneurship, technology, or overcoming adversity, the series offers a firsthand look at what it takes to pursue a dream when circumstances are far from ideal.</text:p>
      <text:p text:style-name="P1"><text:soft-page-break/></text:p>
      <text:p text:style-name="P1">About San Diego AI HELP</text:p>
      <text:p text:style-name="P1"/>
      <text:p text:style-name="P1">San Diego AI HELP provides AI-powered business services designed to help small businesses improve efficiency, marketing, content creation, and digital visibility through practical applications of artificial intelligence technology.</text:p>
      <text:p text:style-name="P1"/>
      <text:p text:style-name="P1">Media Contact:</text:p>
      <text:p text:style-name="P1"/>
      <text:p text:style-name="P1">Daniel Rickey</text:p>
      <text:p text:style-name="P1">(858) 241-8013</text:p>
      <text:p text:style-name="P1">dan@SanDiegoAI.HELP</text:p>
      <text:p text:style-name="P1">SanDiegoAI.HEL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4T17:31:46.575300341</meta:creation-date>
    <dc:date>2026-06-04T19:57:51.632471552</dc:date>
    <meta:editing-duration>PT42M59S</meta:editing-duration>
    <meta:editing-cycles>1</meta:editing-cycles>
    <meta:document-statistic meta:table-count="0" meta:image-count="0" meta:object-count="0" meta:page-count="2" meta:paragraph-count="19" meta:word-count="539" meta:character-count="3680" meta:non-whitespace-character-count="3159"/>
    <meta:generator>LibreOffice/24.2.7.2$Linux_X86_64 LibreOffice_project/420$Build-2</meta:generator>
  </office:meta>
</office:document-meta>
</file>